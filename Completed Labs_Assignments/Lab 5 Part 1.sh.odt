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1000002C7BB260E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4.6425in" draw:z-index="0"><draw:image xlink:href="Pictures/1000000100000401000002C7BB260E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8:29:58.513389358</meta:creation-date>
    <dc:date>2024-12-04T18:30:24.420903075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