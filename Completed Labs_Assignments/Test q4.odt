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1000000F2627B4D4F.png" manifest:media-type="image/png"/>
  <manifest:file-entry manifest:full-path="Pictures/10000001000003010000029B73F9FE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2" text:anchor-type="char" svg:x="-0.0311in" svg:y="2.5173in" svg:width="6.6929in" svg:height="5.8047in" draw:z-index="0"><draw:image xlink:href="Pictures/10000001000003010000029B73F9FE2F.png" xlink:type="simple" xlink:show="embed" xlink:actuate="onLoad" draw:mime-type="image/png"/></draw:frame><draw:frame draw:style-name="fr1" draw:name="Image1" text:anchor-type="char" svg:width="6.6929in" svg:height="2.2457in" draw:z-index="1"><draw:image xlink:href="Pictures/10000001000002D1000000F2627B4D4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22:25:02.058186436</meta:creation-date>
    <dc:date>2024-12-04T22:45:53.017687149</dc:date>
    <meta:editing-duration>PT20M53S</meta:editing-duration>
    <meta:editing-cycles>2</meta:editing-cycles>
    <meta:generator>LibreOffice/24.2.6.2$Linux_X86_64 LibreOffice_project/42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