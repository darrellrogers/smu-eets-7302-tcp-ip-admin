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000000183945F9D8A.png" manifest:media-type="image/png"/>
  <manifest:file-entry manifest:full-path="Pictures/10000001000002F000000183822A9170.png" manifest:media-type="image/png"/>
  <manifest:file-entry manifest:full-path="Pictures/1000000100000401000002C7BB260E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4.6425in" draw:z-index="0"><draw:image xlink:href="Pictures/1000000100000401000002C7BB260EFF.png" xlink:type="simple" xlink:show="embed" xlink:actuate="onLoad" draw:mime-type="image/png"/></draw:frame><draw:frame draw:style-name="fr1" draw:name="Image2" text:anchor-type="char" svg:x="0.0102in" svg:y="4.8228in" svg:width="6.6929in" svg:height="3.4437in" draw:z-index="1"><draw:image xlink:href="Pictures/10000001000002F000000183822A9170.png" xlink:type="simple" xlink:show="embed" xlink:actuate="onLoad" draw:mime-type="image/png"/></draw:frame><draw:frame draw:style-name="fr1" draw:name="Image3" text:anchor-type="char" svg:x="0.6457in" svg:y="7.4618in" svg:width="6.6929in" svg:height="3.4437in" draw:z-index="2"><draw:image xlink:href="Pictures/10000001000002F000000183945F9D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8:29:58.513389358</meta:creation-date>
    <dc:date>2024-12-04T20:43:08.895143560</dc:date>
    <meta:editing-duration>PT2H2M13S</meta:editing-duration>
    <meta:editing-cycles>3</meta:editing-cycles>
    <meta:generator>LibreOffice/24.2.6.2$Linux_X86_64 LibreOffice_project/42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